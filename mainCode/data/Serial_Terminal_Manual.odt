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0000000407F7DDF32.png" manifest:media-type="image/png"/>
  <manifest:file-entry manifest:full-path="Pictures/10000001000002BE000002142A01A0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Title">
      <style:text-properties officeooo:paragraph-rsid="001de0bc"/>
    </style:style>
    <style:style style:name="P2" style:family="paragraph" style:parent-style-name="Heading_20_1">
      <style:paragraph-properties fo:text-align="justify" style:justify-single-word="false"/>
      <style:text-properties officeooo:paragraph-rsid="00245b18"/>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Heading">
      <style:text-properties officeooo:rsid="002071a5" officeooo:paragraph-rsid="0023d050"/>
    </style:style>
    <style:style style:name="P6" style:family="paragraph" style:parent-style-name="Standard">
      <style:paragraph-properties fo:text-indent="0in" style:auto-text-indent="false"/>
      <style:text-properties officeooo:rsid="002071a5" officeooo:paragraph-rsid="0023d050"/>
    </style:style>
    <style:style style:name="P7" style:family="paragraph" style:parent-style-name="Standard">
      <style:paragraph-properties fo:text-indent="0in" style:auto-text-indent="false"/>
      <style:text-properties officeooo:rsid="0021262e" officeooo:paragraph-rsid="002499a6"/>
    </style:style>
    <style:style style:name="P8" style:family="paragraph" style:parent-style-name="Standard">
      <style:paragraph-properties fo:text-indent="0in" style:auto-text-indent="false"/>
      <style:text-properties officeooo:paragraph-rsid="0023d050"/>
    </style:style>
    <style:style style:name="P9" style:family="paragraph" style:parent-style-name="Contents_20_Heading">
      <style:text-properties officeooo:rsid="002c7d9a" officeooo:paragraph-rsid="002c7d9a"/>
    </style:style>
    <style:style style:name="P10" style:family="paragraph" style:parent-style-name="Standard">
      <style:text-properties officeooo:paragraph-rsid="002c7d9a"/>
    </style:style>
    <style:style style:name="P11" style:family="paragraph" style:parent-style-name="Standard">
      <style:text-properties officeooo:rsid="002eed1b" officeooo:paragraph-rsid="002eed1b"/>
    </style:style>
    <style:style style:name="P12" style:family="paragraph" style:parent-style-name="Contents_20_Heading">
      <style:text-properties officeooo:rsid="002be7d0" officeooo:paragraph-rsid="002be7d0"/>
    </style:style>
    <style:style style:name="P13" style:family="paragraph" style:parent-style-name="Standard">
      <style:text-properties officeooo:rsid="002be7d0" officeooo:paragraph-rsid="002be7d0"/>
    </style:style>
    <style:style style:name="P14" style:family="paragraph" style:parent-style-name="Contents_20_Heading">
      <style:text-properties fo:font-size="16pt" officeooo:rsid="002cb29b" officeooo:paragraph-rsid="002cb29b" style:font-size-asian="16pt" style:font-size-complex="16pt"/>
    </style:style>
    <style:style style:name="P15" style:family="paragraph" style:parent-style-name="Contents_20_Heading">
      <style:text-properties fo:font-size="12pt" officeooo:rsid="002cb29b" officeooo:paragraph-rsid="002cb29b" style:font-size-asian="10.5pt" style:font-size-complex="12pt"/>
    </style:style>
    <style:style style:name="P16" style:family="paragraph" style:parent-style-name="Contents_20_2">
      <style:text-properties officeooo:rsid="002cb29b" officeooo:paragraph-rsid="002cb29b"/>
    </style:style>
    <style:style style:name="P17" style:family="paragraph" style:parent-style-name="Contents_20_Heading">
      <style:text-properties officeooo:rsid="002cb29b" officeooo:paragraph-rsid="002cb29b"/>
    </style:style>
    <style:style style:name="P18" style:family="paragraph" style:parent-style-name="Contents_20_2">
      <style:text-properties officeooo:rsid="002e9165" officeooo:paragraph-rsid="002e9165"/>
    </style:style>
    <style:style style:name="P19" style:family="paragraph" style:parent-style-name="Standard">
      <style:text-properties officeooo:paragraph-rsid="002c4c0c"/>
    </style:style>
    <style:style style:name="P20" style:family="paragraph" style:parent-style-name="Standard">
      <style:paragraph-properties fo:break-before="page"/>
    </style:style>
    <style:style style:name="T1" style:family="text">
      <style:text-properties officeooo:rsid="001de0bc"/>
    </style:style>
    <style:style style:name="T2" style:family="text">
      <style:text-properties officeooo:rsid="00245b18"/>
    </style:style>
    <style:style style:name="T3" style:family="text">
      <style:text-properties fo:font-size="14pt" officeooo:rsid="00245b18" style:font-size-asian="14pt" style:font-size-complex="14pt"/>
    </style:style>
    <style:style style:name="T4" style:family="text">
      <style:text-properties officeooo:rsid="00221de0"/>
    </style:style>
    <style:style style:name="T5" style:family="text">
      <style:text-properties officeooo:rsid="002499a6"/>
    </style:style>
    <style:style style:name="T6" style:family="text">
      <style:text-properties officeooo:rsid="0028f909"/>
    </style:style>
    <style:style style:name="T7" style:family="text">
      <style:text-properties officeooo:rsid="0025bcc5"/>
    </style:style>
    <style:style style:name="T8" style:family="text">
      <style:text-properties officeooo:rsid="0021262e"/>
    </style:style>
    <style:style style:name="T9" style:family="text">
      <style:text-properties officeooo:rsid="002cf222"/>
    </style:style>
    <style:style style:name="T10" style:family="text">
      <style:text-properties officeooo:rsid="0030865a"/>
    </style:style>
    <style:style style:name="T11" style:family="text">
      <style:text-properties officeooo:rsid="0023d050"/>
    </style:style>
    <style:style style:name="T12" style:family="text">
      <style:text-properties officeooo:rsid="002c4c0c"/>
    </style:style>
    <style:style style:name="T13" style:family="text">
      <style:text-properties officeooo:rsid="002c7d9a"/>
    </style:style>
    <style:style style:name="T14" style:family="text">
      <style:text-properties officeooo:rsid="00306d8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y="4.0252in" svg:width="2in" svg:height="2in" draw:z-index="1"><draw:image xlink:href="Pictures/1000000100000040000000407F7DDF32.png" xlink:type="simple" xlink:show="embed" xlink:actuate="onLoad" draw:mime-type="image/png"/></draw:frame><text:tab/><text:tab/><text:tab/><text:line-break/><text:line-break/><text:line-break/><text:line-break/></text:p>
      <text:p text:style-name="P1"><text:line-break/><text:line-break/><text:line-break/><text:line-break/><text:line-break/><text:line-break/><text:line-break/></text:p>
      <text:h text:style-name="P2" text:outline-level="1"><text:bookmark-start text:name="__RefHeading___Toc106_4114522680"/><text:span text:style-name="T1"><text:s text:c="31"/></text:span><text:span text:style-name="T2">Using Serial Terminal</text:span><text:bookmark-end text:name="__RefHeading___Toc106_4114522680"/></text:h>
      <text:p text:style-name="Subtitle"><text:span text:style-name="T3">A serial port monitoring software made with Processing</text:span><text:line-break/><text:tab/><text:tab/><text:tab/><text:tab/><text:tab/><text:tab/><text:line-break/><text:tab/><text:tab/><text:tab/><text:tab/><text:tab/><text:line-break/><text:tab/><text:tab/><text:tab/><text:tab/><text:tab/><text:line-break/><text:line-break/><text:line-break/></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1%19Introduction%19C%7Ctoxmark" text:style-name="Index_20_Link" text:visited-style-name="Index_20_Link">Introduction<text:tab/>2</text:a></text:p>
          <text:p text:style-name="P4"><text:a xlink:type="simple" xlink:href="#1%19Installing%20Serial%20Terminal%19C%7Ctoxmark" text:style-name="Index_20_Link" text:visited-style-name="Index_20_Link">Installing Serial Terminal<text:tab/>3</text:a></text:p>
        </text:index-body>
      </text:table-of-content>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start text:id="IMark1369451983552" text:outline-level="2"/>Introduction<text:toc-mark-end text:id="IMark1369451983552"/></text:p>
      <text:p text:style-name="P6"/>
      <text:p text:style-name="P6">Serial Terminal is designed for anyone who wants fast and easy software for sending and receiving data from serial ports. Although it is designed for and tested primarily with Arduino boards, it has the potential to communicate with virtually anything that can connect to a usb port.</text:p>
      <text:p text:style-name="P6"/>
      <text:p text:style-name="P7">This software provides several advantages over the traditional Arduino IDE monitor, first and foremost being the ability to log data. Also a few simple features such as search for text and COM port settings <text:span text:style-name="T4">provides a little extra convenience </text:span>that the <text:span text:style-name="T4">standard </text:span>Arduino monitor <text:span text:style-name="T4">does not have. </text:span></text:p>
      <text:p text:style-name="P7"/>
      <text:p text:style-name="P7"><text:span text:style-name="T5">Serial Terminal also makes an ideal interface for custom projects i.e. model rockets, weather station, rc car, e</text:span><text:span text:style-name="T6">tc</text:span><text:span text:style-name="T5">. Since the project is </text:span><text:span text:style-name="T7">written</text:span><text:span text:style-name="T5"> in Processing, the user interface can be easily customized to suit your needs </text:span><text:span text:style-name="T7">with the intuitive Processing IDE</text:span><text:span text:style-name="T5">.</text:span></text:p>
      <text:p text:style-name="P6"/>
      <text:p text:style-name="P8"><text:span text:style-name="T8">As of this writing Serial Terminal is tested and supported on Windows 10, Kubuntu 25.</text:span><text:span text:style-name="T9">10</text:span><text:span text:style-name="T8">, Ubuntu 24.04.</text:span><text:span text:style-name="T10">4</text:span><text:span text:style-name="T8">, and Linux Mint Cinnamon 22.1. If your OS is not supported, please open a</text:span><text:span text:style-name="T11">n</text:span><text:span text:style-name="T8"> issue in the </text:span><text:span text:style-name="T11">G</text:span><text:span text:style-name="T8">ithub repository for this project. </text:span><text:a xlink:type="simple" xlink:href="https://github.com/bonner72/SerialTerminal" text:style-name="Internet_20_link" text:visited-style-name="Visited_20_Internet_20_Link"><text:span text:style-name="T8">https://github.com/bonner72/SerialTerminal</text:span></text:a></text:p>
      <text:p text:style-name="P8"/>
      <text:p text:style-name="P8"/>
      <text:p text:style-name="P8"/>
      <text:p text:style-name="P8"/>
      <text:p text:style-name="P8"/>
      <text:p text:style-name="P9"><text:soft-page-break/><text:toc-mark-start text:id="IMark1369451983232" text:outline-level="2"/>Requirements<text:toc-mark-end text:id="IMark1369451983232"/></text:p>
      <text:p text:style-name="P10"><text:span text:style-name="T12">JDK-17-</text:span><text:span text:style-name="T13">LTS</text:span><text:span text:style-name="T12">: </text:span><text:a xlink:type="simple" xlink:href="https://adoptium.net/temurin/releases?version=17" text:style-name="Internet_20_link" text:visited-style-name="Visited_20_Internet_20_Link">https://adoptium.net/temurin/releases?version=17</text:a></text:p>
      <text:p text:style-name="P11">sudo apt install <text:span text:style-name="T14">default-jre</text:span></text:p>
      <text:p text:style-name="P11">java -version</text:p>
      <text:p text:style-name="P12"><text:toc-mark-start text:id="IMark1369451982512" text:outline-level="2"/>Installing Serial Terminal<text:toc-mark-end text:id="IMark1369451982512"/></text:p>
      <text:p text:style-name="Standard"><text:toc-mark text:string-value=" " text:outline-level="2"/></text:p>
      <text:p text:style-name="P13">Serial Terminal can be installed via a packaged installer file which can be found here: <text:a xlink:type="simple" xlink:href="https://github.com/bonner72/SerialTerminal/releases" text:style-name="Internet_20_link" text:visited-style-name="Visited_20_Internet_20_Link">https://github.com/bonner72/SerialTerminal/releases</text:a></text:p>
      <text:p text:style-name="P13"/>
      <text:p text:style-name="P14">Windows</text:p>
      <text:p text:style-name="P15">Steps:</text:p>
      <text:p text:style-name="P16">1. Download and run “SerialTerminal<text:span text:style-name="T9">_(version)-Windows-x86_64-installer</text:span>.exe”</text:p>
      <text:p text:style-name="P16">2. Set install directory(or leave default)</text:p>
      <text:p text:style-name="P16">3. Set shortcuts</text:p>
      <text:p text:style-name="P16">4. Install</text:p>
      <text:p text:style-name="P16"/>
      <text:p text:style-name="P16"/>
      <text:p text:style-name="P17">Linux</text:p>
      <text:p text:style-name="P15">Steps:</text:p>
      <text:p text:style-name="P16">1. <text:span text:style-name="T9">Download and extract “SerialTerminal_(version)-Linux-amd64.tar.gz”</text:span></text:p>
      <text:p text:style-name="P18">2. Double click SerialTerminal</text:p>
      <text:p text:style-name="P13"/>
      <text:p text:style-name="P19"/>
      <text:p text:style-name="P19"/>
      <text:p text:style-name="P19"/>
      <text:p text:style-name="P20"><draw:frame draw:style-name="fr2" draw:name="Image1" text:anchor-type="char" svg:width="6.9252in" svg:height="5.248in" draw:z-index="0"><draw:image xlink:href="Pictures/10000001000002BE000002142A01A07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6:43:38.485000000</meta:creation-date>
    <dc:date>2026-04-07T21:49:39.595737200</dc:date>
    <meta:editing-duration>PT20H3M8S</meta:editing-duration>
    <meta:editing-cycles>17</meta:editing-cycles>
    <meta:generator>LibreOffice/25.2.4.3$Windows_X86_64 LibreOffice_project/33e196637044ead23f5c3226cde09b47731f7e27</meta:generator>
    <meta:document-statistic meta:table-count="0" meta:image-count="2" meta:object-count="0" meta:page-count="4" meta:paragraph-count="37" meta:word-count="254" meta:character-count="1860" meta:non-whitespace-character-count="1565"/>
  </office:meta>
</office:document-meta>
</file>